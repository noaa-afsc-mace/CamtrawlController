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2000017E00001D88000027110641845D.svm" manifest:media-type="image/x-svm"/>
  <manifest:file-entry manifest:full-path="Pictures/10000001000001AE0000023848818CE8.png" manifest:media-type="image/png"/>
  <manifest:file-entry manifest:full-path="Pictures/TablePreview2.svm" manifest:media-type=""/>
  <manifest:file-entry manifest:full-path="Pictures/200005C200001DFF00002711924D1025.svm" manifest:media-type="image/x-svm"/>
  <manifest:file-entry manifest:full-path="Pictures/10000001000001B4000002382E79873B.png" manifest:media-type="image/png"/>
  <manifest:file-entry manifest:full-path="Pictures/2000023200001E6C0000271183F9B9C4.svm" manifest:media-type="image/x-svm"/>
  <manifest:file-entry manifest:full-path="Pictures/TablePreview1.svm" manifest:media-type=""/>
  <manifest:file-entry manifest:full-path="Pictures/10000001000001C7000002381C4A8976.png" manifest:media-type="image/png"/>
  <manifest:file-entry manifest:full-path="Pictures/2000001600001F45000027116C37DF16.svm" manifest:media-type="image/x-svm"/>
  <manifest:file-entry manifest:full-path="Pictures/10000001000001BB00000238B2B9FDF2.png" manifest:media-type="image/png"/>
  <manifest:file-entry manifest:full-path="Pictures/200005FC000025F300002711BDD6D1B2.svm" manifest:media-type="image/x-svm"/>
  <manifest:file-entry manifest:full-path="Pictures/100000010000022800000238A8127F65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fill="solid" draw:fill-color="#ff8000" draw:opacity="53%" draw:textarea-horizontal-align="justify" draw:textarea-vertical-align="middle" draw:auto-grow-height="false" fo:min-height="0.175cm" fo:min-width="0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00a933" draw:opacity="53%" draw:textarea-horizontal-align="justify" draw:textarea-vertical-align="middle" draw:auto-grow-height="false" fo:min-height="0.175cm" fo:min-width="0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3838" draw:opacity="53%" draw:textarea-horizontal-align="justify" draw:textarea-vertical-align="middle" draw:auto-grow-height="false" fo:min-height="0.575cm" fo:min-width="1.03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fill="solid" draw:fill-color="#ff3838" draw:opacity="53%" draw:textarea-horizontal-align="justify" draw:textarea-vertical-align="middle" draw:auto-grow-height="false" fo:min-height="0.356cm" fo:min-width="0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8000" draw:opacity="53%" draw:textarea-horizontal-align="justify" draw:textarea-vertical-align="middle" draw:auto-grow-height="false" fo:min-height="0.657cm" fo:min-width="1.094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00a933" draw:opacity="53%" draw:textarea-horizontal-align="justify" draw:textarea-vertical-align="middle" draw:auto-grow-height="false" fo:min-height="0.9cm" fo:min-width="0.488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800080" draw:opacity="53%" draw:textarea-horizontal-align="justify" draw:textarea-vertical-align="middle" draw:auto-grow-height="false" fo:min-height="0.35cm" fo:min-width="0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800080" draw:opacity="53%" draw:textarea-horizontal-align="justify" draw:textarea-vertical-align="middle" draw:auto-grow-height="false" fo:min-height="2.462cm" fo:min-width="2.907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4.16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6" style:family="graphic" style:parent-style-name="standard">
      <style:graphic-properties draw:fill="solid" draw:fill-color="#ff3838" draw:opacity="53%" draw:textarea-horizontal-align="justify" draw:textarea-vertical-align="middle" draw:auto-grow-height="false" fo:min-height="0.375cm" fo:min-width="0.631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ff8000" draw:opacity="53%" draw:textarea-horizontal-align="justify" draw:textarea-vertical-align="middle" draw:auto-grow-height="false" fo:min-height="0.282cm" fo:min-width="0.55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00a933" draw:opacity="53%" draw:textarea-horizontal-align="justify" draw:textarea-vertical-align="middle" draw:auto-grow-height="false" fo:min-height="1.668cm" fo:min-width="1.687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800080" draw:opacity="53%" draw:textarea-horizontal-align="justify" draw:textarea-vertical-align="middle" draw:auto-grow-height="false" fo:min-height="0.306cm" fo:min-width="0.525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ff8000" draw:opacity="53%" draw:textarea-horizontal-align="justify" draw:textarea-vertical-align="middle" draw:auto-grow-height="false" fo:min-height="0.707cm" fo:min-width="0.025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800080" draw:opacity="53%" draw:textarea-horizontal-align="justify" draw:textarea-vertical-align="middle" draw:auto-grow-height="false" fo:min-height="0.694cm" fo:min-width="0.025cm" style:writing-mode="lr-tb" loext:decorative="false"/>
      <style:paragraph-properties style:writing-mode="lr-tb"/>
    </style:style>
    <style:style style:name="co1" style:family="table-column">
      <style:table-column-properties style:column-width="0.746cm" style:use-optimal-column-width="false"/>
    </style:style>
    <style:style style:name="co2" style:family="table-column">
      <style:table-column-properties style:column-width="1.159cm" style:use-optimal-column-width="false"/>
    </style:style>
    <style:style style:name="co3" style:family="table-column">
      <style:table-column-properties style:column-width="7.001cm" style:use-optimal-column-width="false"/>
    </style:style>
    <style:style style:name="co4" style:family="table-column">
      <style:table-column-properties style:column-width="0.923cm" style:use-optimal-column-width="false"/>
    </style:style>
    <style:style style:name="co5" style:family="table-column">
      <style:table-column-properties style:column-width="1.008cm" style:use-optimal-column-width="false"/>
    </style:style>
    <style:style style:name="co6" style:family="table-column">
      <style:table-column-properties style:column-width="6.694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solid" draw:fill-color="#ff8000" draw:opacity="53%"/>
      <style:paragraph-properties fo:text-align="center" style:writing-mode="lr-tb"/>
    </style:style>
    <style:style style:name="P5" style:family="paragraph">
      <loext:graphic-properties draw:fill="solid" draw:fill-color="#00a933" draw:opacity="53%"/>
      <style:paragraph-properties fo:text-align="center" style:writing-mode="lr-tb"/>
    </style:style>
    <style:style style:name="P6" style:family="paragraph">
      <loext:graphic-properties draw:fill="solid" draw:fill-color="#ff3838" draw:opacity="53%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800080" draw:opacity="53%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02cm" svg:height="7.014cm" svg:x="8.1cm" svg:y="3.473cm">
          <draw:image xlink:href="Pictures/2000017E00001D88000027110641845D.svm" xlink:type="simple" xlink:show="embed" xlink:actuate="onLoad" draw:mime-type="image/x-svm">
            <text:p/>
          </draw:image>
          <draw:image xlink:href="Pictures/10000001000001AE0000023848818CE8.png" xlink:type="simple" xlink:show="embed" xlink:actuate="onLoad" draw:mime-type="image/png"/>
        </draw:frame>
        <draw:frame draw:style-name="gr1" draw:text-style-name="P1" draw:layer="layout" svg:width="5.417cm" svg:height="6.861cm" svg:x="7.839cm" svg:y="3.444cm">
          <draw:image xlink:href="Pictures/200005C200001DFF00002711924D1025.svm" xlink:type="simple" xlink:show="embed" xlink:actuate="onLoad" draw:mime-type="image/x-svm">
            <text:p/>
          </draw:image>
          <draw:image xlink:href="Pictures/10000001000001B4000002382E79873B.png" xlink:type="simple" xlink:show="embed" xlink:actuate="onLoad" draw:mime-type="image/png"/>
        </draw:frame>
        <draw:frame draw:style-name="gr2" draw:layer="layout" svg:width="17.53cm" svg:height="2.621cm" svg:x="2.031cm" svg:y="12.2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bg-none">
              <table:table-cell/>
              <table:table-cell table:style-name="ce1">
                <text:p text:style-name="P2">1</text:p>
              </table:table-cell>
              <table:table-cell table:style-name="ce2">
                <text:p text:style-name="P3"><text:span text:style-name="T1">XZMDKVG55W-4</text:span></text:p>
                <text:p text:style-name="P3"><text:span text:style-name="T1">(red/green LED)</text:span></text:p>
              </table:table-cell>
              <table:table-cell/>
              <table:table-cell table:style-name="ce1">
                <text:p text:style-name="P2">1</text:p>
              </table:table-cell>
              <table:table-cell table:style-name="ce2">
                <text:p text:style-name="P3"><text:span text:style-name="T1">MLX92231LSE-AAA-009-RE</text:span></text:p>
              </table:table-cell>
            </table:table-row>
            <table:table-row table:style-name="ro1" table:default-cell-style-name="bg-none">
              <table:table-cell/>
              <table:table-cell table:style-name="ce1">
                <text:p text:style-name="P2">1</text:p>
              </table:table-cell>
              <table:table-cell table:style-name="ce2">
                <text:p text:style-name="P3"><text:span text:style-name="T1">150141YB73100</text:span></text:p>
                <text:p text:style-name="P3"><text:span text:style-name="T1">(blue/yellow LED)</text:span></text:p>
              </table:table-cell>
              <table:table-cell/>
              <table:table-cell table:style-name="ce1"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" draw:text-style-name="P4" draw:layer="layout" svg:width="0.481cm" svg:height="0.425cm" svg:x="2.15cm" svg:y="13.8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432cm" svg:height="0.425cm" svg:x="11.124cm" svg:y="12.6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38cm" svg:height="0.825cm" svg:x="8.262cm" svg:y="6.12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563cm" svg:height="0.962cm" svg:x="7.918cm" svg:y="11.125cm">
          <draw:text-box>
            <text:p text:style-name="P2">ICs etc.</text:p>
          </draw:text-box>
        </draw:frame>
        <draw:frame draw:style-name="gr7" draw:text-style-name="P8" draw:layer="layout" svg:width="14.2cm" svg:height="1.673cm" svg:x="3.85cm" svg:y="1.331cm">
          <draw:text-box>
            <text:p text:style-name="P2">Camtrawl Controller</text:p>
            <text:p text:style-name="P2">RTO</text:p>
          </draw:text-box>
        </draw:frame>
        <draw:custom-shape draw:style-name="gr8" draw:text-style-name="P6" draw:layer="layout" svg:width="0.481cm" svg:height="0.606cm" svg:x="2.175cm" svg:y="12.4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594cm" svg:height="0.907cm" svg:x="11.456cm" svg:y="6.0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988cm" svg:height="1.15cm" svg:x="10.187cm" svg:y="3.88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7.53cm" svg:height="0.961cm" svg:x="1.925cm" svg:y="17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bg-none">
              <table:table-cell/>
              <table:table-cell table:style-name="ce1">
                <text:p text:style-name="P2">1</text:p>
              </table:table-cell>
              <table:table-cell table:style-name="ce2">
                <text:p text:style-name="P3"><text:span text:style-name="T1">SM08B-NSHSS-TB</text:span></text:p>
              </table:table-cell>
              <table:table-cell/>
              <table:table-cell table:style-name="ce1"/>
              <table:table-cell table:style-name="ce2"/>
            </table:table-row>
          </table:table>
          <draw:image xlink:href="Pictures/TablePreview2.svm" xlink:type="simple" xlink:show="embed" xlink:actuate="onLoad"/>
        </draw:frame>
        <draw:frame draw:style-name="gr6" draw:text-style-name="P7" draw:layer="layout" svg:width="5.563cm" svg:height="0.962cm" svg:x="7.812cm" svg:y="16.443cm">
          <draw:text-box>
            <text:p text:style-name="P2">Connectors</text:p>
          </draw:text-box>
        </draw:frame>
        <draw:custom-shape draw:style-name="gr11" draw:text-style-name="P9" draw:layer="layout" svg:width="0.5cm" svg:height="0.6cm" svg:x="2.05cm" svg:y="17.7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407cm" svg:height="2.712cm" svg:x="9.043cm" svg:y="8.031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6.278cm" svg:height="7.844cm" svg:x="7.593cm" svg:y="3.04cm">
          <draw:image xlink:href="Pictures/2000001600001F45000027116C37DF16.svm" xlink:type="simple" xlink:show="embed" xlink:actuate="onLoad" draw:mime-type="image/x-svm">
            <text:p/>
          </draw:image>
          <draw:image xlink:href="Pictures/10000001000001C7000002381C4A8976.png" xlink:type="simple" xlink:show="embed" xlink:actuate="onLoad" draw:mime-type="image/png"/>
        </draw:frame>
        <draw:frame draw:style-name="gr14" draw:text-style-name="P7" draw:layer="layout" svg:width="8.238cm" svg:height="4.418cm" svg:x="2.568cm" svg:y="20.225cm">
          <draw:text-box>
            <text:p>Programming Notes:</text:p>
          </draw:text-box>
        </draw:frame>
      </draw:page>
      <draw:page draw:name="page2" draw:style-name="dp1" draw:master-page-name="Default">
        <draw:frame draw:style-name="gr15" draw:text-style-name="P1" draw:layer="layout" svg:width="5.962cm" svg:height="7.656cm" svg:x="7.906cm" svg:y="3.112cm">
          <draw:image xlink:href="Pictures/2000023200001E6C0000271183F9B9C4.svm" xlink:type="simple" xlink:show="embed" xlink:actuate="onLoad" draw:mime-type="image/x-svm">
            <text:p/>
          </draw:image>
          <draw:image xlink:href="Pictures/10000001000001BB00000238B2B9FDF2.png" xlink:type="simple" xlink:show="embed" xlink:actuate="onLoad" draw:mime-type="image/png"/>
        </draw:frame>
        <draw:frame draw:style-name="gr15" draw:text-style-name="P1" draw:layer="layout" svg:width="4.84cm" svg:height="4.983cm" svg:x="8.164cm" svg:y="3.759cm">
          <draw:image xlink:href="Pictures/200005FC000025F300002711BDD6D1B2.svm" xlink:type="simple" xlink:show="embed" xlink:actuate="onLoad" draw:mime-type="image/x-svm">
            <text:p/>
          </draw:image>
          <draw:image xlink:href="Pictures/100000010000022800000238A8127F65.png" xlink:type="simple" xlink:show="embed" xlink:actuate="onLoad" draw:mime-type="image/png"/>
        </draw:frame>
        <draw:frame draw:style-name="gr2" draw:layer="layout" svg:width="17.53cm" svg:height="0.961cm" svg:x="2.031cm" svg:y="12.2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bg-none">
              <table:table-cell/>
              <table:table-cell table:style-name="ce1">
                <text:p text:style-name="P2">2</text:p>
              </table:table-cell>
              <table:table-cell table:style-name="ce2">
                <text:p text:style-name="P3"><text:span text:style-name="T1">220 R</text:span></text:p>
              </table:table-cell>
              <table:table-cell/>
              <table:table-cell table:style-name="ce1">
                <text:p text:style-name="P2">2</text:p>
              </table:table-cell>
              <table:table-cell table:style-name="ce2">
                <text:p text:style-name="P3"><text:span text:style-name="T1">10 k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" draw:text-style-name="P4" draw:layer="layout" svg:width="0.481cm" svg:height="0.425cm" svg:x="11.162cm" svg:y="12.5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432cm" svg:height="0.425cm" svg:x="2.118cm" svg:y="20.1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131cm" svg:height="0.625cm" svg:x="8.306cm" svg:y="6.987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563cm" svg:height="0.962cm" svg:x="7.918cm" svg:y="11.125cm">
          <draw:text-box>
            <text:p text:style-name="P2">Resistors</text:p>
          </draw:text-box>
        </draw:frame>
        <draw:frame draw:style-name="gr7" draw:text-style-name="P8" draw:layer="layout" svg:width="14.2cm" svg:height="1.673cm" svg:x="3.85cm" svg:y="1.331cm">
          <draw:text-box>
            <text:p text:style-name="P2">Camtrawl Controller</text:p>
            <text:p text:style-name="P2">RTO</text:p>
          </draw:text-box>
        </draw:frame>
        <draw:custom-shape draw:style-name="gr8" draw:text-style-name="P6" draw:layer="layout" svg:width="0.481cm" svg:height="0.606cm" svg:x="2.175cm" svg:y="12.4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05cm" svg:height="0.532cm" svg:x="9.125cm" svg:y="5.64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.187cm" svg:height="1.918cm" svg:x="10.081cm" svg:y="6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7.53cm" svg:height="0.961cm" svg:x="2.006cm" svg:y="16.0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bg-none">
              <table:table-cell/>
              <table:table-cell table:style-name="ce1">
                <text:p text:style-name="P2">2</text:p>
              </table:table-cell>
              <table:table-cell table:style-name="ce2">
                <text:p text:style-name="P3"><text:span text:style-name="T1">0.1 uF 50v</text:span></text:p>
              </table:table-cell>
              <table:table-cell/>
              <table:table-cell table:style-name="ce1"/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gr6" draw:text-style-name="P7" draw:layer="layout" svg:width="5.563cm" svg:height="0.962cm" svg:x="7.893cm" svg:y="14.918cm">
          <draw:text-box>
            <text:p text:style-name="P2">Capacitors</text:p>
          </draw:text-box>
        </draw:frame>
        <draw:custom-shape draw:style-name="gr11" draw:text-style-name="P9" draw:layer="layout" svg:width="0.5cm" svg:height="0.6cm" svg:x="2.131cm" svg:y="16.2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025cm" svg:height="0.556cm" svg:x="12.175cm" svg:y="5.6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131cm" svg:height="0.625cm" svg:x="8.331cm" svg:y="7.6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25cm" svg:height="0.957cm" svg:x="9.55cm" svg:y="3.8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525cm" svg:height="0.944cm" svg:x="11.787cm" svg:y="3.58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7.53cm" svg:height="0.961cm" svg:x="1.97cm" svg:y="19.8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bg-none">
              <table:table-cell/>
              <table:table-cell table:style-name="ce1">
                <text:p text:style-name="P2">1</text:p>
              </table:table-cell>
              <table:table-cell table:style-name="ce2">
                <text:p text:style-name="P3"><text:span text:style-name="T1">ATTINY85-20SU</text:span></text:p>
              </table:table-cell>
              <table:table-cell/>
              <table:table-cell table:style-name="ce1"/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6" draw:text-style-name="P7" draw:layer="layout" svg:width="5.563cm" svg:height="0.962cm" svg:x="7.857cm" svg:y="18.668cm">
          <draw:text-box>
            <text:p text:style-name="P2">ICs</text:p>
          </draw:text-box>
        </draw:frame>
        <draw:frame draw:style-name="gr13" draw:text-style-name="P2" draw:layer="layout" svg:width="6.278cm" svg:height="7.844cm" svg:x="7.773cm" svg:y="3.04cm">
          <draw:image xlink:href="Pictures/2000001600001F45000027116C37DF16.svm" xlink:type="simple" xlink:show="embed" xlink:actuate="onLoad" draw:mime-type="image/x-svm">
            <text:p/>
          </draw:image>
          <draw:image xlink:href="Pictures/10000001000001C7000002381C4A897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26T08:58:02.670545800</meta:creation-date>
    <dc:date>2026-03-26T13:28:52.889873300</dc:date>
    <meta:editing-duration>PT2H39M6S</meta:editing-duration>
    <meta:editing-cycles>22</meta:editing-cycles>
    <meta:generator>LibreOffice/25.8.5.2$Windows_X86_64 LibreOffice_project/9c8b85f387cc00a89945a79c9e6239f32e450ac2</meta:generator>
    <meta:document-statistic meta:object-count="38"/>
  </office:meta>
</office:document-meta>
</file>